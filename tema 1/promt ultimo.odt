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1318fb"/>
    </style:style>
    <style:style style:name="P2" style:family="paragraph" style:parent-style-name="Text_20_body">
      <style:text-properties officeooo:paragraph-rsid="001ba138"/>
    </style:style>
    <style:style style:name="P3" style:family="paragraph" style:parent-style-name="Text_20_body">
      <style:text-properties officeooo:paragraph-rsid="000e9aee"/>
    </style:style>
    <style:style style:name="P4" style:family="paragraph" style:parent-style-name="Text_20_body">
      <style:text-properties officeooo:paragraph-rsid="001023e7"/>
    </style:style>
    <style:style style:name="P5" style:family="paragraph" style:parent-style-name="Text_20_body">
      <style:text-properties officeooo:rsid="001a10aa" officeooo:paragraph-rsid="001a10aa"/>
    </style:style>
    <style:style style:name="P6" style:family="paragraph" style:parent-style-name="Text_20_body">
      <style:text-properties officeooo:paragraph-rsid="0018db26"/>
    </style:style>
    <style:style style:name="P7" style:family="paragraph" style:parent-style-name="Text_20_body">
      <style:text-properties officeooo:rsid="001f43ae" officeooo:paragraph-rsid="001f43ae"/>
    </style:style>
    <style:style style:name="T1" style:family="text">
      <style:text-properties officeooo:rsid="00131139"/>
    </style:style>
    <style:style style:name="T2" style:family="text">
      <style:text-properties officeooo:rsid="001b58f8"/>
    </style:style>
    <style:style style:name="T3" style:family="text">
      <style:text-properties officeooo:rsid="001318fb"/>
    </style:style>
    <style:style style:name="T4" style:family="text">
      <style:text-properties officeooo:rsid="0013a17d"/>
    </style:style>
    <style:style style:name="T5" style:family="text">
      <style:text-properties officeooo:rsid="001ba138"/>
    </style:style>
    <style:style style:name="T6" style:family="text">
      <style:text-properties officeooo:rsid="001408dc"/>
    </style:style>
    <style:style style:name="T7" style:family="text">
      <style:text-properties officeooo:rsid="001d5d28"/>
    </style:style>
    <style:style style:name="T8" style:family="text">
      <style:text-properties officeooo:rsid="0015cbb7"/>
    </style:style>
    <style:style style:name="T9" style:family="text">
      <style:text-properties officeooo:rsid="0018db26"/>
    </style:style>
    <style:style style:name="T10" style:family="text">
      <style:text-properties officeooo:rsid="000e9aee"/>
    </style:style>
    <style:style style:name="T11" style:family="text">
      <style:text-properties officeooo:rsid="001a10aa"/>
    </style:style>
    <style:style style:name="T12" style:family="text">
      <style:text-properties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úa como un desarrollador web experto en UI/UX y diseño responsivo. Crea una página web moderna <text:span text:style-name="T1">e interactiva y</text:span> profesional para una clase de propiedad intensiva y extensiva en termodinamica. </text:p>
      <text:p text:style-name="P1">Estructura Requerida: </text:p>
      <text:p text:style-name="P2">1. Título Principal: H1 con el nombre del tema y un subtítulo explicativo. 2. Desarrollo del tema: Un grid de tarjetas (cards) <text:span text:style-name="T2">que pueden ser</text:span> vertical<text:span text:style-name="T3">(1 o 2 columnas) </text:span><text:span text:style-name="T2">u horizontal (1 o 2 filas) o combinacion de ambas</text:span>. Cada tarjeta debe incluir una imagen y un título. <text:span text:style-name="T4">I</text:span>ncluye abundante informacion teorica y practica para fortalecer el contenido. <text:span text:style-name="T4">I</text:span>ncluye un texto haciendo una comparacion con algun fenomeno natural que sirva de ejemplo para explicar <text:span text:style-name="T4">el tema didacticamente</text:span>. Incluye <text:s/>un recuadro de detalle técnico. En cada parte del desarrollo coloca un renglon de curiosidades en donde colocas un texto de hechos curiosos relacionados con el tema. </text:p>
      <text:p text:style-name="P2">Para las imágenes: <text:span text:style-name="T5">inserta enlaces con imagenes web representativas del tema o </text:span>deja el espacio <text:span text:style-name="T5">en el codigo e </text:span>indica el lugar donde pegar la url. <text:span text:style-name="T6">Vincula las tarjetas a </text:span><text:s/>paginas web <text:span text:style-name="T6">como wikipedia u otras, </text:span><text:span text:style-name="T5">para reforzar</text:span><text:span text:style-name="T6">.</text:span></text:p>
      <text:p text:style-name="P3">3. Reflexión: Un recuadro destacado con fondo diferenciado para un mensaje de cierre reflexivo. </text:p>
      <text:p text:style-name="P4">4. Zona de Preguntas (IA): <text:span text:style-name="T7">genera</text:span> <text:span text:style-name="T6">5</text:span> preguntas, las preguntas deben estar vinculadas a una IA gratuita <text:span text:style-name="T7">que cambien cada vez que se abra el archivo.</text:span> <text:span text:style-name="T7">L</text:span>a<text:span text:style-name="T7">s</text:span> pregunta<text:span text:style-name="T7">s</text:span> debe<text:span text:style-name="T7">n estar en formato : selección simple, selección multiple, verdadero y falso, palabra perdida, arrastar y soltar, calculada simple, cloze y analisis.</text:span> <text:span text:style-name="T7">Incluye</text:span> un botón para mostrar la retroalimentación. <text:span text:style-name="T7">L</text:span>a retroalimentacion <text:span text:style-name="T6">debe estar vinculada con una IA gratuita que no requiera suscripción o registro</text:span> <text:span text:style-name="T8">y </text:span>debe <text:span text:style-name="T8">corresponder </text:span>con la respuesta del estudiante: por ejemplo si la respuesta no es correcta, <text:span text:style-name="T8">indicar que no es correcta y porque</text:span>. <text:s/> </text:p>
      <text:p text:style-name="P4"><text:span text:style-name="T9">5</text:span><text:span text:style-name="T10">. </text:span>Funcionalidad Especial: Gamificación: Implementa un 'birrete flotante' (🎓) que solo aparezca en la esquina inferior derecha de 300 x 300px con una animación siempre, <text:span text:style-name="T8">solo</text:span> cuando el usuario haya escrito una respuesta en un 50% <text:span text:style-name="T8">de acierto</text:span>. Si la respuesta esta por debajo del 50% de acierto mostrar un texto para que lo intente de nuevo. </text:p>
      <text:p text:style-name="P5">6. Incluye al final un boton ancho que diga “Estoy preparado voy a la evaluacion” o algo similar que genere autoestima para ir a la evaluacion y vincula ese boton con moodle.</text:p>
      <text:p text:style-name="P6"><text:span text:style-name="T11">7</text:span>. Footer: Incluye el nombre del autor y el año actual. <text:span text:style-name="T10">ESP Kenny Uriepero. Termodinamica UPTBolivar</text:span> </text:p>
      <text:p text:style-name="P3">Personalización (CSS): • Deja los estilos en una etiqueta <text:s/>clara. • Etiqueta claramente dónde modificar los colores: busca los comentarios /* COLOR DE FONDO <text:span text:style-name="T12">/, /</text:span> COLOR DE TÍTULOS <text:span text:style-name="T12">/, /</text:span> COLOR DE BOTONES <text:span text:style-name="T12">/ y /</text:span> COLOR DE LETRA */. Estilo Visual: • Usa una paleta de colores limpia y moderna (fuente 'Inter'). • Asegúrate de que sea 100% responsivo para móviles y escritorio.</text:p>
      <text:p text:style-name="Text_20_body"/>
      <text:p text:style-name="Text_20_body"/>
      <text:p text:style-name="P7">Key de google para IA</text:p>
      <text:p text:style-name="Text_20_body">AQ.Ab8RN6Lf7gh_d9CYmODGaOqEuNPY_5oJVgGf3uYsQfZbX-bMJQ</text:p>
      <text:p text:style-name="Text_20_body"/>
      <text:p text:style-name="Text_20_body"><text:soft-page-break/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8T14:11:09.750166900</meta:creation-date>
    <dc:date>2026-06-18T18:09:46.580476900</dc:date>
    <meta:editing-duration>PT2H20M1S</meta:editing-duration>
    <meta:editing-cycles>19</meta:editing-cycles>
    <meta:generator>LibreOffice/26.2.1.2$Windows_X86_64 LibreOffice_project/620$Build-2</meta:generator>
    <meta:document-statistic meta:table-count="0" meta:image-count="0" meta:object-count="0" meta:page-count="2" meta:paragraph-count="12" meta:word-count="460" meta:character-count="2843" meta:non-whitespace-character-count="2383"/>
  </office:meta>
</office:document-meta>
</file>