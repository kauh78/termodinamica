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753cm"/>
    </style:style>
    <style:style style:name="Tabla1.B" style:family="table-column">
      <style:table-column-properties style:column-width="9.028cm"/>
    </style:style>
    <style:style style:name="Tabla1.C" style:family="table-column">
      <style:table-column-properties style:column-width="5.219cm"/>
    </style:style>
    <style:style style:name="Tabla1.A1" style:family="table-cell">
      <style:table-cell-properties style:vertical-align="middle" fo:padding-left="0.318cm" fo:padding-right="0.318cm" fo:padding-top="0.212cm" fo:padding-bottom="0.212cm" fo:border="0.05pt solid #c4c7c5"/>
    </style:style>
    <style:style style:name="P1"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style>
    <style:style style:name="P6" style:family="paragraph" style:parent-style-name="Table_20_Contents">
      <style:paragraph-properties fo:margin-left="0cm" fo:margin-right="0cm" fo:margin-top="0cm" fo:margin-bottom="0cm" style:contextual-spacing="false" fo:line-height="114%" fo:text-indent="0cm" style:auto-text-indent="false"/>
    </style:style>
    <style:style style:name="P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Heading_20_3" style:list-style-name="L4"/>
    <style:style style:name="P12" style:family="paragraph" style:parent-style-name="Heading_20_3" style:list-style-name="L5"/>
    <style:style style:name="P13" style:family="paragraph" style:parent-style-name="Heading_20_3" style:list-style-name="L6"/>
    <style:style style:name="P14" style:family="paragraph" style:parent-style-name="Text_20_body">
      <style:text-properties style:font-name="Google Sans Text" fo:font-weight="bold"/>
    </style:style>
    <style:style style:name="P1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paragraph-properties fo:margin-left="1cm" fo:margin-right="1cm" fo:margin-top="0cm" fo:margin-bottom="0.499cm" style:contextual-spacing="false" fo:line-height="114%" fo:text-align="justify" style:justify-single-word="false" fo:text-indent="0cm" style:auto-text-indent="false"/>
      <style:text-properties style:font-name="Google Sans Text" officeooo:rsid="000b1be1" officeooo:paragraph-rsid="000b1be1"/>
    </style:style>
    <style:style style:name="P18" style:family="paragraph" style:parent-style-name="Text_20_body">
      <style:paragraph-properties fo:margin-top="0cm" fo:margin-bottom="0.499cm" style:contextual-spacing="false" fo:line-height="114%" fo:text-align="justify" style:justify-single-word="false"/>
      <style:text-properties style:font-name="Google Sans Text" fo:font-weight="bold" officeooo:rsid="000b1be1"/>
    </style:style>
    <style:style style:name="P19" style:family="paragraph" style:parent-style-name="Text_20_body" style:list-style-name="L8">
      <style:paragraph-properties fo:margin-top="0cm" fo:margin-bottom="0.499cm" style:contextual-spacing="false" fo:line-height="114%" fo:text-align="justify" style:justify-single-word="false"/>
      <style:text-properties style:font-name="Google Sans Text" officeooo:rsid="000b1be1"/>
    </style:style>
    <style:style style:name="P20" style:family="paragraph" style:parent-style-name="Text_20_body" style:list-style-name="L9">
      <style:paragraph-properties fo:margin-top="0cm" fo:margin-bottom="0.499cm" style:contextual-spacing="false" fo:line-height="114%" fo:text-align="justify" style:justify-single-word="false"/>
      <style:text-properties style:font-name="Google Sans Text" officeooo:rsid="000b1be1"/>
    </style:style>
    <style:style style:name="P21" style:family="paragraph" style:parent-style-name="Text_20_body" style:list-style-name="L10">
      <style:paragraph-properties fo:margin-top="0cm" fo:margin-bottom="0.499cm" style:contextual-spacing="false" fo:line-height="114%" fo:text-align="justify" style:justify-single-word="false"/>
      <style:text-properties style:font-name="Google Sans Text" officeooo:rsid="000b1be1"/>
    </style:style>
    <style:style style:name="P22" style:family="paragraph" style:parent-style-name="Text_20_body" style:list-style-name="L11">
      <style:paragraph-properties fo:margin-top="0cm" fo:margin-bottom="0.499cm" style:contextual-spacing="false" fo:line-height="114%" fo:text-align="justify" style:justify-single-word="false"/>
      <style:text-properties style:font-name="Google Sans Text" officeooo:rsid="000b1be1"/>
    </style:style>
    <style:style style:name="P23" style:family="paragraph" style:parent-style-name="Text_20_body" style:list-style-name="L12">
      <style:paragraph-properties fo:margin-top="0cm" fo:margin-bottom="0.499cm" style:contextual-spacing="false" fo:line-height="114%" fo:text-align="justify" style:justify-single-word="false"/>
      <style:text-properties style:font-name="Google Sans Text" officeooo:rsid="000b1be1"/>
    </style:style>
    <style:style style:name="P24"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Google Sans Text" officeooo:rsid="000b1be1" officeooo:paragraph-rsid="000b1be1"/>
    </style:style>
    <style:style style:name="P25" style:family="paragraph" style:parent-style-name="Standard">
      <style:paragraph-properties fo:text-align="justify" style:justify-single-word="false"/>
      <style:text-properties officeooo:rsid="0008bc50" officeooo:paragraph-rsid="0008bc50"/>
    </style:style>
    <style:style style:name="P26" style:family="paragraph" style:parent-style-name="Text_20_body">
      <style:paragraph-properties fo:text-align="justify" style:justify-single-word="false"/>
      <style:text-properties officeooo:rsid="0008bc50"/>
    </style:style>
    <style:style style:name="T1" style:family="text">
      <style:text-properties fo:font-weight="bold"/>
    </style:style>
    <style:style style:name="T2" style:family="text">
      <style:text-properties style:font-name="Google Sans Text"/>
    </style:style>
    <style:style style:name="T3" style:family="text">
      <style:text-properties fo:font-style="italic"/>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5ef5c03e34e8bf8d">
        <text:section text:style-name="Sect1" text:name="model-response-message-contentr_f736d73f7b723eb5">
          <text:section text:style-name="Sect1" text:name="Sección1">
            <text:section text:style-name="Sect1" text:name="model-response-message-contentr_ba49e95aa2e541c1">
              <text:h text:style-name="P1" text:outline-level="3">1. Banner Principal</text:h>
              <text:list text:style-name="L1">
                <text:list-item>
                  <text:p text:style-name="P2"><text:span text:style-name="T1">Título:</text:span> Tema 1: Conceptos Básicos de la Termodinámica</text:p>
                </text:list-item>
                <text:list-item>
                  <text:p text:style-name="P2"><text:span text:style-name="T1">Subtítulo:</text:span> La ciencia fundamental que descifra cómo la energía, el calor y el trabajo dan forma al universo.</text:p>
                </text:list-item>
                <text:list-item>
                  <text:p text:style-name="P2"><text:span text:style-name="T1">Imagen:</text:span> Fotografía de una turbina de alta eficiencia en corte transversal, con iluminación industrial que resalte sus componentes metálicos.</text:p>
                </text:list-item>
                <text:list-item>
                  <text:p text:style-name="P2"><text:span text:style-name="T1">Dimensión:</text:span> 1200 x 400 px.</text:p>
                </text:list-item>
              </text:list>
              <text:h text:style-name="P1" text:outline-level="3">2. Sección de Introducción y Motivación</text:h>
              <text:list text:style-name="L2">
                <text:list-item>
                  <text:p text:style-name="P3"><text:span text:style-name="T1">Texto:</text:span> ¿Por qué todo en el universo se mueve gracias a la energía? Desde la ignición de un cohete espacial hasta la compleja red eléctrica de una ciudad o el funcionamiento de un simple refrigerador en tu cocina, la termodinámica dicta las reglas del juego. Comprender estos principios es descifrar el motor que impulsa la existencia.</text:p>
                </text:list-item>
                <text:list-item>
                  <text:p text:style-name="P4">Carrusel (3 imágenes):</text:p>
                  <text:list>
                    <text:list-item>
                      <text:p text:style-name="P3"><text:span text:style-name="T1">Cohete:</text:span> Despegue con estela de fuego intenso.</text:p>
                    </text:list-item>
                    <text:list-item>
                      <text:p text:style-name="P3"><text:span text:style-name="T1">Refrigerador:</text:span> Interior organizado con iluminación clara y fresca.</text:p>
                    </text:list-item>
                    <text:list-item>
                      <text:p text:style-name="P3"><text:span text:style-name="T1">Panel Solar:</text:span> Campo de paneles captando la luz del atardecer.</text:p>
                    </text:list-item>
                  </text:list>
                </text:list-item>
                <text:list-item>
                  <text:p text:style-name="P3"><text:span text:style-name="T1">Dimensión Obligatoria:</text:span> 1200 x 675 px.</text:p>
                </text:list-item>
              </text:list>
              <text:h text:style-name="P1" text:outline-level="3">3. Tarjetas Interactivas (6 temas)</text:h>
              <text:p text:style-name="P5">Dimensiones obligatorias: 600 x 600 px por image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6"><text:span text:style-name="Strong_20_Emphasis"><text:span text:style-name="T2">Tema</text:span></text:span></text:p>
                    </table:table-cell>
                    <table:table-cell table:style-name="Tabla1.A1" office:value-type="string">
                      <text:p text:style-name="P6"><text:span text:style-name="Strong_20_Emphasis"><text:span text:style-name="T2">Texto Introductorio</text:span></text:span></text:p>
                    </table:table-cell>
                    <table:table-cell table:style-name="Tabla1.A1" office:value-type="string">
                      <text:p text:style-name="P6"><text:span text:style-name="Strong_20_Emphasis"><text:span text:style-name="T2">Imagen Conceptual</text:span></text:span></text:p>
                    </table:table-cell>
                  </table:table-row>
                </table:table-header-rows>
                <table:table-row>
                  <table:table-cell table:style-name="Tabla1.A1" office:value-type="string">
                    <text:p text:style-name="P7">Energía</text:p>
                  </table:table-cell>
                  <table:table-cell table:style-name="Tabla1.A1" office:value-type="string">
                    <text:p text:style-name="P8">¿Qué es realmente la energía? Explora las leyes inquebrantables que dictan cómo esta se transforma, se transfiere y nunca se pierde, solo cambia de forma.</text:p>
                  </table:table-cell>
                  <table:table-cell table:style-name="Tabla1.A1" office:value-type="string">
                    <text:p text:style-name="P8">Diagrama de flujo de energía con flechas convergentes.</text:p>
                  </table:table-cell>
                </table:table-row>
                <table:table-row>
                  <table:table-cell table:style-name="Tabla1.A1" office:value-type="string">
                    <text:p text:style-name="P7">Sistemas</text:p>
                  </table:table-cell>
                  <table:table-cell table:style-name="Tabla1.A1" office:value-type="string">
                    <text:p text:style-name="P8">Para estudiar el universo, primero debemos limitarlo. Aprende a definir fronteras y a diferenciar entre sistemas abiertos, cerrados y aislados en cualquier análisis.</text:p>
                  </table:table-cell>
                  <table:table-cell table:style-name="Tabla1.A1" office:value-type="string">
                    <text:p text:style-name="P8">Esquema de un sistema de control con líneas discontinuas de frontera.</text:p>
                  </table:table-cell>
                </table:table-row>
                <table:table-row>
                  <table:table-cell table:style-name="Tabla1.A1" office:value-type="string">
                    <text:p text:style-name="P7">Propiedades</text:p>
                  </table:table-cell>
                  <table:table-cell table:style-name="Tabla1.A1" office:value-type="string">
                    <text:p text:style-name="P8">Los datos son el lenguaje de la naturaleza. Descubre cómo la presión, temperatura y volumen se convierten en las coordenadas precisas para mapear el estado de una sustancia.</text:p>
                  </table:table-cell>
                  <table:table-cell table:style-name="Tabla1.A1" office:value-type="string">
                    <text:p text:style-name="P8">Ilustración artística de un termómetro y un manómetro analógico.</text:p>
                  </table:table-cell>
                </table:table-row>
                <text:soft-page-break/>
                <table:table-row>
                  <table:table-cell table:style-name="Tabla1.A1" office:value-type="string">
                    <text:p text:style-name="P7">Procesos</text:p>
                  </table:table-cell>
                  <table:table-cell table:style-name="Tabla1.A1" office:value-type="string">
                    <text:p text:style-name="P8">Todo cambio es un proceso. Descubre la trayectoria que sigue un sistema entre dos estados y por qué los caminos cuasiestáticos son el ideal del ingeniero.</text:p>
                  </table:table-cell>
                  <table:table-cell table:style-name="Tabla1.A1" office:value-type="string">
                    <text:p text:style-name="P8">Gráfico de trayectoria curva en un plano termodinámico.</text:p>
                  </table:table-cell>
                </table:table-row>
                <table:table-row>
                  <table:table-cell table:style-name="Tabla1.A1" office:value-type="string">
                    <text:p text:style-name="P7">Ley Cero</text:p>
                  </table:table-cell>
                  <table:table-cell table:style-name="Tabla1.A1" office:value-type="string">
                    <text:p text:style-name="P8">El termómetro es nuestro testigo. Comprende la base de la medición térmica: cómo dos cuerpos en equilibrio con un tercero están en equilibrio absoluto entre sí.</text:p>
                  </table:table-cell>
                  <table:table-cell table:style-name="Tabla1.A1" office:value-type="string">
                    <text:p text:style-name="P8">Dos bloques metálicos en contacto térmico sobre una superficie aislante.</text:p>
                  </table:table-cell>
                </table:table-row>
                <table:table-row>
                  <table:table-cell table:style-name="Tabla1.A1" office:value-type="string">
                    <text:p text:style-name="P7">Presión</text:p>
                  </table:table-cell>
                  <table:table-cell table:style-name="Tabla1.A1" office:value-type="string">
                    <text:p text:style-name="P8">La fuerza distribuida. Desde la presión atmosférica hasta la manométrica, aprende a medir el empuje invisible que permite el funcionamiento de máquinas y fluidos.</text:p>
                  </table:table-cell>
                  <table:table-cell table:style-name="Tabla1.A1" office:value-type="string">
                    <text:p text:style-name="P8">Manómetro de tubo en U con fluido coloreado en desnivel.</text:p>
                  </table:table-cell>
                </table:table-row>
              </table:table>
              <text:h text:style-name="P1" text:outline-level="3">4. Sección Colapsable (Reto y Resumen)</text:h>
              <text:list xml:id="list77332507" text:style-name="L3">
                <text:list-item>
                  <text:p text:style-name="P9">Bloque 1: 💡 Reto Mental: El refrigerador abierto</text:p>
                  <text:list>
                    <text:list-item>
                      <text:p text:style-name="P10"><text:span text:style-name="T3">Contenido:</text:span> Si dejas la puerta de un refrigerador abierta dentro de una habitación perfectamente aislada y cerrada, ¿la temperatura del aire bajará o subirá?</text:p>
                    </text:list-item>
                    <text:list-item>
                      <text:p text:style-name="P10"><text:span text:style-name="T3">Explicación:</text:span> ¡La temperatura subirá! El motor del refrigerador genera más calor hacia el entorno al intentar comprimir el gas que el calor que es capaz de extraer del interior del equipo.</text:p>
                    </text:list-item>
                  </text:list>
                </text:list-item>
              </text:list>
              <text:p text:style-name="Text_20_body"><text:tab/><text:tab/></text:p>
              <text:list text:style-name="L4">
                <text:list-item>
                  <text:h text:style-name="P11" text:outline-level="3">El ventilador en la habitación sellada</text:h>
                </text:list-item>
              </text:list>
              <text:p text:style-name="Quotations">Si enciendes un ventilador dentro de una habitación perfectamente aislada y cerrada, ¿la temperatura del aire bajará, subirá o se mantendrá igual?</text:p>
              <text:p text:style-name="Text_20_body"><text:span text:style-name="T1">Respuesta:</text:span> <text:span text:style-name="T1">Subirá ligeramente.</text:span></text:p>
              <text:p text:style-name="Text_20_body">El ventilador consume energía eléctrica y la convierte en movimiento de las aspas, pero ese movimiento eventualmente se disipa como calor por fricción (aire rozando las aspas, rozamiento en los rodamientos). Además, el motor del ventilador se calienta por su propia ineficiencia. Toda la electricidad que entra al ventilador termina como calor en la habitación. La sensación de "frescura" que da el ventilador se debe a que acelera la evaporación del sudor de tu piel, pero eso no enfría el aire de la habitación; al contrario, lo calienta un poco más.</text:p>
              <text:list text:style-name="L5">
                <text:list-item>
                  <text:h text:style-name="P12" text:outline-level="3">Abrir la puerta del horno caliente</text:h>
                </text:list-item>
              </text:list>
              <text:p text:style-name="Quotations">Si abres la puerta de un horno que está a 200 °C dentro de una habitación perfectamente aislada y cerrada (con el horno apagado), ¿la temperatura del aire bajará o subirá?</text:p>
              <text:p text:style-name="Text_20_body"><text:soft-page-break/><text:span text:style-name="T1">Respuesta:</text:span> <text:span text:style-name="T1">Subirá (al principio) y luego se estabilizará por encima de la temperatura inicial.</text:span></text:p>
              <text:p text:style-name="Text_20_body">Cuando abres la puerta, el aire caliente del interior del horno se mezcla con el aire más frío de la habitación. La temperatura final de equilibrio será un promedio ponderado. Como el horno estaba más caliente que la habitación, la temperatura del aire de la habitación <text:span text:style-name="T1">aumenta</text:span> hasta igualarse con la del horno. No hay enfriamiento posible porque no hay forma de expulsar el calor al exterior. Si el horno aún estuviera encendido, seguiría aportando más calor y la temperatura subiría aún más.</text:p>
              <text:list text:style-name="L6">
                <text:list-item>
                  <text:h text:style-name="P13" text:outline-level="3">Un calentador eléctrico y un refrigerador juntos</text:h>
                </text:list-item>
              </text:list>
              <text:p text:style-name="Quotations">Dentro de una habitación perfectamente aislada y cerrada, se conectan simultáneamente un calentador eléctrico de 1000 W y un refrigerador que consume 200 W. ¿La temperatura del aire subirá, bajará o se mantendrá?</text:p>
              <text:p text:style-name="Text_20_body"><text:span text:style-name="T1">Respuesta:</text:span> <text:span text:style-name="T1">Subirá, y el aumento será equivalente a 1200 W de calor.</text:span></text:p>
              <text:p text:style-name="Text_20_body">El calentador convierte toda su potencia (1000 W) directamente en calor. El refrigerador, además de transferir calor desde su interior hacia la habitación, también disipa los 200 W que consume como calor extra (por el motor y compresor). La potencia térmica total añadida a la habitación es la suma: <text:span text:style-name="T1">1000 W + 200 W = 1200 W</text:span>. No hay cancelación de efectos porque el refrigerador no expulsa calor fuera de la habitación; simplemente lo mueve de adentro hacia afuera de sí mismo, pero todo queda dentro del recinto cerrado.</text:p>
              <text:p text:style-name="Text_20_body"/>
              <text:p text:style-name="P14"/>
              <text:list text:continue-list="list77332507" text:style-name="L3">
                <text:list-item>
                  <text:p text:style-name="P9">Bloque 2: 🔑 Resumen del Capítulo</text:p>
                  <text:list>
                    <text:list-item>
                      <text:p text:style-name="P10"><text:span text:style-name="T3">Sistema:</text:span> La porción del universo que elegimos para nuestro análisis.</text:p>
                    </text:list-item>
                    <text:list-item>
                      <text:p text:style-name="P10"><text:span text:style-name="T3">Estado:</text:span> La condición del sistema descrita por un conjunto de propiedades específicas.</text:p>
                    </text:list-item>
                    <text:list-item>
                      <text:p text:style-name="P10"><text:span text:style-name="T3">Proceso:</text:span> La evolución de un sistema a medida que transita de un estado de equilibrio a otro.</text:p>
                    </text:list-item>
                  </text:list>
                </text:list-item>
              </text:list>
              <text:h text:style-name="P1" text:outline-level="3">Nota técnica para Google Sites: Mantén la simetría</text:h>
              <text:p text:style-name="P15">Al insertar las imágenes de <text:span text:style-name="T1">600 x 600 px</text:span> en los bloques de 3 columnas, es posible que el sistema intente recortarlas automáticamente para ajustarse al diseño. Para evitar esto:</text:p>
              <text:list text:style-name="L7">
                <text:list-item>
                  <text:p text:style-name="P16">Haz clic sobre la imagen dentro del bloque.</text:p>
                </text:list-item>
                <text:list-item>
                  <text:p text:style-name="P16">En la barra de herramientas flotante que aparece sobre la imagen, selecciona el icono de <text:span text:style-name="T1">"Anular recorte" (Uncrop)</text:span>.</text:p>
                </text:list-item>
                <text:list-item>
                  <text:p text:style-name="P16">Esto forzará a Google Sites a mostrar la imagen completa, manteniendo la simetría perfecta de tus tarjetas y evitando que se pierdan detalles importantes de tus diagramas o iconos.</text:p>
                </text:list-item>
              </text:list>
            </text:section>
            <text:p text:style-name="P15"/>
          </text:section>
          <text:p text:style-name="P15"/>
        </text:section>
      </text:section>
      <text:p text:style-name="Standard"/>
      <text:p text:style-name="Standard"><text:soft-page-break/></text:p>
      <text:p text:style-name="Standard"/>
      <text:section text:style-name="Sect1" text:name="model-response-message-contentr_5eb642033fcc3961">
        <text:p text:style-name="P17">Actúa como un experto en Diseño Web (UX/UI) y Diseño Instruccional especializado en divulgación científica. Tu objetivo es redactar el contenido y definir las especificaciones técnicas de las imágenes para una página de Google Sites sobre el Capítulo 1: 'Conceptos Básicos' de Termodinámica de Çengel.</text:p>
        <text:p text:style-name="P18">Por favor, genera el contenido para las siguientes secciones, incluyendo para cada una la descripción de la imagen ideal y sus dimensiones exactas para asegurar una alineación perfecta en Google Sites:</text:p>
        <text:p text:style-name="P18">1. Banner Principal:</text:p>
        <text:list text:style-name="L8">
          <text:list-item>
            <text:p text:style-name="P19">Redacta un título y subtítulo inspiradores.</text:p>
          </text:list-item>
          <text:list-item>
            <text:p text:style-name="P19">Especifica la descripción de la imagen representativa (motor/planta térmica) y su dimensión (1200x400 px).</text:p>
          </text:list-item>
        </text:list>
        <text:p text:style-name="P18">2. Sección de Introducción y Motivación:</text:p>
        <text:list text:style-name="L9">
          <text:list-item>
            <text:p text:style-name="P20">Redacta un texto breve (50 palabras) con la pregunta retórica: '¿Por qué todo en el universo se mueve gracias a la energía?'.</text:p>
          </text:list-item>
          <text:list-item>
            <text:p text:style-name="P20">Describe 3 imágenes para un carrusel (cohete, refrigerador, panel solar) e indica su dimensión obligatoria (1200x675 px) para mantener la proporción 16:9.</text:p>
          </text:list-item>
        </text:list>
        <text:p text:style-name="P18">3. Tarjetas Interactivas (6 temas):</text:p>
        <text:list text:style-name="L10">
          <text:list-item>
            <text:p text:style-name="P21">Para cada uno de los 6 temas (Energía, Sistemas, Propiedades, Procesos, Ley Cero, Presión), redacta un texto introductorio de máximo 30 palabras, inspirador y no técnico.</text:p>
          </text:list-item>
          <text:list-item>
            <text:p text:style-name="P21">Para cada tema, sugiere una imagen conceptual (ej. diagrama de sistema, termómetro, etc.) y especifica su dimensión cuadrada obligatoria de 600x600 px.</text:p>
          </text:list-item>
        </text:list>
        <text:p text:style-name="P18">4. Sección Colapsable (Reto y Resumen):</text:p>
        <text:list text:style-name="L11">
          <text:list-item>
            <text:p text:style-name="P22">Redacta el reto mental del 'Refrigerador abierto' y su explicación intuitiva.</text:p>
          </text:list-item>
          <text:list-item>
            <text:p text:style-name="P22">Redacta el resumen en 3 líneas de: Sistema, Estado y Proceso.</text:p>
          </text:list-item>
        </text:list>
        <text:p text:style-name="P18">Instrucciones de formato:</text:p>
        <text:list text:style-name="L12">
          <text:list-item>
            <text:p text:style-name="P23">El tono debe ser profesional, inspirador y orientado a estudiantes de ingeniería.</text:p>
          </text:list-item>
          <text:list-item>
            <text:p text:style-name="P23">Organiza la respuesta claramente por bloques (1, 2, 3, 4) para que pueda copiar y pegar la información directamente en Google Sites.</text:p>
          </text:list-item>
          <text:list-item>
            <text:p text:style-name="P23"><text:soft-page-break/>Incluye una nota final sobre cómo usar la función 'Anular recorte' en Google Sites para mantener la integridad de las imágenes 600x600 px.</text:p>
          </text:list-item>
        </text:list>
        <text:p text:style-name="P24"/>
      </text:section>
      <text:p text:style-name="P25"/>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3T14:00:19.730428200</meta:creation-date>
    <dc:date>2026-06-15T12:19:45.381886400</dc:date>
    <meta:editing-duration>PT4H28M30S</meta:editing-duration>
    <meta:editing-cycles>12</meta:editing-cycles>
    <meta:generator>LibreOffice/26.2.1.2$Windows_X86_64 LibreOffice_project/620$Build-2</meta:generator>
    <meta:document-statistic meta:table-count="1" meta:image-count="0" meta:object-count="0" meta:page-count="5" meta:paragraph-count="79" meta:word-count="1310" meta:character-count="8074" meta:non-whitespace-character-count="6874"/>
  </office:meta>
</office:document-meta>
</file>