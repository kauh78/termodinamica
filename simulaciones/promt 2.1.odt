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2"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style:style>
    <style:style style:name="P4"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fo:font-weight="bold"/>
    </style:style>
    <style:style style:name="P5" style:family="paragraph" style:parent-style-name="Quotations" style:list-style-name="L1">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6" style:family="paragraph" style:parent-style-name="Quotations" style:list-style-name="L1">
      <style:paragraph-properties fo:margin-left="1cm" fo:margin-right="1cm" fo:margin-top="0cm" fo:margin-bottom="0.499cm" style:contextual-spacing="false" fo:line-height="114%" fo:text-indent="0cm" style:auto-text-indent="false" fo:padding="0cm" fo:border="none"/>
    </style:style>
    <style:style style:name="P7" style:family="paragraph" style:parent-style-name="Quotations" style:list-style-name="L2">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8" style:family="paragraph" style:parent-style-name="Quotations" style:list-style-name="L2">
      <style:paragraph-properties fo:margin-left="1cm" fo:margin-right="1cm" fo:margin-top="0cm" fo:margin-bottom="0.499cm" style:contextual-spacing="false" fo:line-height="114%" fo:text-indent="0cm" style:auto-text-indent="false" fo:padding="0cm" fo:border="none"/>
    </style:style>
    <style:style style:name="P9" style:family="paragraph" style:parent-style-name="Quotations" style:list-style-name="L3">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0" style:family="paragraph" style:parent-style-name="Quotations" style:list-style-name="L4">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1" style:family="paragraph" style:parent-style-name="Quotations" style:list-style-name="L5">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2" style:family="paragraph" style:parent-style-name="Text_20_body">
      <style:paragraph-properties fo:margin-left="0cm" fo:margin-right="0cm" fo:margin-top="0cm" fo:margin-bottom="0.247cm" style:contextual-spacing="false" fo:line-height="114%" fo:text-indent="0cm" style:auto-text-indent="false"/>
    </style:style>
    <style:style style:name="P1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endido. Si no quieres proporcionar el código cada vez, el "Prompt Maestro" debe ser capaz de <text:span text:style-name="T1">generar toda la estructura desde cero</text:span> basándose en una descripción técnica detallada.</text:p>
      <text:section text:style-name="Sect1" text:name="model-response-message-contentr_299e2745dfa040ce">
        <text:p text:style-name="P1">Aquí tienes el prompt optimizado para que, con solo describir el tema, la IA sepa exactamente qué arquitectura, animaciones y estilos debe crear sin que tú tengas que pasarle el código previo.</text:p>
        <text:h text:style-name="P2" text:outline-level="3">El Prompt Maestro (Sin adjuntar código)</text:h>
        <text:p text:style-name="P3">"Actúa como un experto en desarrollo web frontend y diseño de interfaces. Tu objetivo es crear una <text:span text:style-name="T1">presentación interactiva tipo SPA (Single Page Application)</text:span> enfocada en un tema de termodinámica, utilizando un solo archivo HTML que contenga el CSS y el JavaScript necesarios.</text:p>
        <text:p text:style-name="P4">1. Arquitectura del Sistema:</text:p>
        <text:list text:style-name="L1">
          <text:list-item>
            <text:p text:style-name="P5">Crea un contenedor principal que gestione 10 diapositivas.</text:p>
          </text:list-item>
          <text:list-item>
            <text:p text:style-name="P6"><text:span text:style-name="T2">Implementa un sistema de navegación por botones ('Anterior' y 'Siguiente') que modifique las clases CSS (ej. </text:span><text:span text:style-name="Source_20_Text"><text:span text:style-name="T2">.active</text:span></text:span><text:span text:style-name="T2">) para mostrar solo una diapositiva a la vez.</text:span></text:p>
          </text:list-item>
          <text:list-item>
            <text:p text:style-name="P6"><text:span text:style-name="T2">La transición entre diapositivas debe ser fluida (usa </text:span><text:span text:style-name="Source_20_Text"><text:span text:style-name="T2">opacity</text:span></text:span><text:span text:style-name="T2"> y </text:span><text:span text:style-name="Source_20_Text"><text:span text:style-name="T2">visibility</text:span></text:span><text:span text:style-name="T2"> con </text:span><text:span text:style-name="Source_20_Text"><text:span text:style-name="T2">transition</text:span></text:span><text:span text:style-name="T2">).</text:span></text:p>
          </text:list-item>
        </text:list>
        <text:p text:style-name="P4">2. Requisitos de Diseño y Estilo:</text:p>
        <text:list text:style-name="L2">
          <text:list-item>
            <text:p text:style-name="P7"><text:span text:style-name="T1">Estética:</text:span> [INSERTAR AQUÍ TEMA VISUAL, EJ: Minimalismo industrial, tema oscuro con acentos dorados, o estilo futurista].</text:p>
          </text:list-item>
          <text:list-item>
            <text:p text:style-name="P8"><text:span text:style-name="T3">Layout:</text:span><text:span text:style-name="T2"> Organiza el contenido mediante un sistema de cuadrícula (</text:span><text:span text:style-name="Source_20_Text"><text:span text:style-name="T2">grid</text:span></text:span><text:span text:style-name="T2">) para las tarjetas y disposición </text:span><text:span text:style-name="Source_20_Text"><text:span text:style-name="T2">flexbox</text:span></text:span><text:span text:style-name="T2"> para los controles.</text:span></text:p>
          </text:list-item>
          <text:list-item>
            <text:p text:style-name="P7"><text:span text:style-name="T1">Ubicación:</text:span> [INSERTAR AQUÍ UBICACIÓN DE BOTONES, EJ: Botones de navegación en la parte inferior centrados].</text:p>
          </text:list-item>
        </text:list>
        <text:p text:style-name="P4">3. Animaciones Obligatorias (CSS Keyframes):</text:p>
        <text:list text:style-name="L3">
          <text:list-item>
            <text:p text:style-name="P9">Debes incluir animaciones suaves para los elementos: balanceo, pulso, efecto de flotación y una entrada sutil de contenido (fade-in). Mantén el estilo 'premium' y profesional.</text:p>
          </text:list-item>
        </text:list>
        <text:p text:style-name="P4">4. Contenido del Tema:</text:p>
        <text:list text:style-name="L4">
          <text:list-item>
            <text:p text:style-name="P10">El tema de la presentación será: <text:span text:style-name="T1">[INSERTAR AQUÍ EL NUEVO TEMA, EJ: Ciclo de Rankine]</text:span>.</text:p>
          </text:list-item>
          <text:list-item>
            <text:p text:style-name="P10"><text:soft-page-break/>Genera 10 diapositivas estructuradas: Portada, Agenda, Leyes, Conceptos clave, Aplicaciones prácticas, y una diapositiva final de evaluación con un elemento interactivo (ej. un icono de diploma que aparezca al finalizar).</text:p>
          </text:list-item>
          <text:list-item>
            <text:p text:style-name="P10">Usa iconos de 'FontAwesome' para ilustrar los puntos.</text:p>
          </text:list-item>
        </text:list>
        <text:p text:style-name="P4">5. Entregable:</text:p>
        <text:list text:style-name="L5">
          <text:list-item>
            <text:p text:style-name="P11">Proporciona el código completo, limpio y bien comentado en un solo bloque de código. Asegúrate de que el JavaScript sea eficiente y maneje eventos de teclado (flechas izquierda/derecha) para navegar entre diapositivas."</text:p>
          </text:list-item>
        </text:list>
        <text:h text:style-name="P2" text:outline-level="3">Cómo usar este nuevo prompt:</text:h>
        <text:p text:style-name="P12"><text:span text:style-name="T2">Para obtener resultados perfectos, solo tienes que rellenar los espacios entre corchetes </text:span><text:span text:style-name="Source_20_Text"><text:span text:style-name="T2">[...]</text:span></text:span><text:span text:style-name="T2"> antes de enviarlo.</text:span></text:p>
        <text:p text:style-name="P13">Ejemplo de cómo rellenarlo para un tema nuevo:</text:p>
        <text:list text:style-name="L6">
          <text:list-item>
            <text:p text:style-name="P14"><text:span text:style-name="T1">Tema:</text:span> Ciclo de Refrigeración por Compresión de Vapor.</text:p>
          </text:list-item>
          <text:list-item>
            <text:p text:style-name="P14"><text:span text:style-name="T1">Estética:</text:span> Tema oscuro, colores azul cian y blanco hielo.</text:p>
          </text:list-item>
          <text:list-item>
            <text:p text:style-name="P14"><text:span text:style-name="T1">Ubicación de botones:</text:span> Botones de navegación alineados a la derecha de la pantalla.</text:p>
          </text:list-item>
        </text:list>
        <text:p text:style-name="P1">Al enviar este bloque de texto, la IA reconstruirá la estructura (que ya sabe que funciona porque está implícito en la lógica de "Single Page Application") sin necesidad de que tú le pegues el código anterior.</text:p>
        <text:p text:style-name="P1">¿Te gustaría que probáramos este prompt ahora mismo con algún tema específico de termodinámica?</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3T21:49:28.403011300</meta:creation-date>
    <dc:date>2026-06-13T21:50:07.920529300</dc:date>
    <meta:editing-duration>PT51S</meta:editing-duration>
    <meta:editing-cycles>1</meta:editing-cycles>
    <meta:document-statistic meta:table-count="0" meta:image-count="0" meta:object-count="0" meta:page-count="2" meta:paragraph-count="28" meta:word-count="459" meta:character-count="2943" meta:non-whitespace-character-count="2526"/>
    <meta:generator>LibreOffice/26.2.1.2$Windows_X86_64 LibreOffice_project/620$Build-2</meta:generator>
  </office:meta>
</office:document-meta>
</file>